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2E87AA9CBD5.png" manifest:media-type="image/png"/>
  <manifest:file-entry manifest:full-path="Pictures/10000001000002CF0000013C1E1ED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3.0429in" draw:z-index="0"><draw:image xlink:href="Pictures/10000001000002CF0000013C1E1ED45E.png" xlink:type="simple" xlink:show="embed" xlink:actuate="onLoad" draw:mime-type="image/png"/></draw:frame><draw:frame draw:style-name="fr1" draw:name="Image2" text:anchor-type="char" svg:x="0.1264in" svg:y="3.728in" svg:width="4.8846in" svg:height="5.3445in" draw:z-index="1"><draw:image xlink:href="Pictures/10000001000002A8000002E87AA9CB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9:56:01.237744433</meta:creation-date>
    <meta:print-date>2025-04-02T11:52:00.843303763</meta:print-date>
    <dc:date>2025-04-02T12:22:00.960503948</dc:date>
    <meta:editing-duration>PT21M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